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Welcome to Trilium Notes!</text:span></text:p>
      <text:p text:style-name="Text_20_body">This is initial "demo" document provided by TriliumNext by default to showcase some of its features and also give you some ideas how you might structure your notes. You can play with it, modify note content and tree structure as you wish.</text:p>
      <text:p text:style-name="Text_20_body">If you need any help, visit TriliumNext website: <text:a xlink:type="simple" xlink:href="https://github.com/TriliumNext" text:style-name="Internet_20_link" text:visited-style-name="Visited_20_Internet_20_Link">https://github.com/TriliumNext</text:a></text:p>
      <text:p text:style-name="Preformatted_20_Text"><text:span text:style-name="Source_20_Text"><text:s text:c="8"/>void foo() {</text:span></text:p>
      <text:p text:style-name="Preformatted_20_Text"><text:span text:style-name="Source_20_Text"><text:s text:c="16"/>// Bar</text:span></text:p>
      <text:p text:style-name="P1"><text:span text:style-name="Source_20_Text"><text:s text:c="8"/>}</text:span></text:p>
      <text:h text:style-name="Heading_20_3" text:outline-level="3">Cleanup</text:h>
      <text:p text:style-name="Text_20_body">Once you're finished with experimenting and want to cleanup these pages, you can simply delete them all.</text:p>
      <text:h text:style-name="Heading_20_3" text:outline-level="3">Formatting</text:h>
      <text:p text:style-name="Text_20_body">TriliumNext supports classic formatting like <text:span text:style-name="Emphasis">italic</text:span>, <text:span text:style-name="Strong_20_Emphasis">bold</text:span>, <text:span text:style-name="Emphasis"><text:span text:style-name="Strong_20_Emphasis">bold and italic</text:span></text:span>. Of course you can add links like this one pointing to <text:a xlink:type="simple" xlink:href="http://www.google.com/" text:style-name="Internet_20_link" text:visited-style-name="Visited_20_Internet_20_Link">google.com</text:a></text:p>
      <text:p text:style-name="Text_20_body">Lists</text:p>
      <text:p text:style-name="Text_20_body"><text:span text:style-name="Strong_20_Emphasis">Ordered:</text:span></text:p>
      <text:list text:style-name="L1">
        <text:list-item>
          <text:p text:style-name="P2">First Item</text:p>
        </text:list-item>
        <text:list-item>
          <text:p text:style-name="P2">Second item</text:p>
          <text:list>
            <text:list-item>
              <text:p text:style-name="P2">First sub-item</text:p>
              <text:list>
                <text:list-item>
                  <text:p text:style-name="P3">sub-sub-item</text:p>
                </text:list-item>
              </text:list>
            </text:list-item>
          </text:list>
        </text:list-item>
      </text:list>
      <text:p text:style-name="Text_20_body"><text:span text:style-name="Strong_20_Emphasis">Unordered:</text:span></text:p>
      <text:list text:style-name="L2">
        <text:list-item>
          <text:p text:style-name="P4">Item</text:p>
        </text:list-item>
        <text:list-item>
          <text:p text:style-name="P4">Another item</text:p>
          <text:list>
            <text:list-item>
              <text:p text:style-name="P5">Sub-item</text:p>
            </text:list-item>
          </text:list>
        </text:list-item>
      </text:list>
      <text:p text:style-name="Text_20_body">Block quotes</text:p>
      <text:p text:style-name="Quotations">Whereof one cannot speak, thereof one must be silent”</text:p>
      <text:p text:style-name="Quotations">– Ludwig Wittgenstein</text:p>
      <text:p text:style-name="Text_20_body">Checkout also other examples like <text:a xlink:type="simple" xlink:href="#root/cW6rhQNFutg7" text:style-name="Internet_20_link" text:visited-style-name="Visited_20_Internet_20_Link">tables</text:a>, <text:a xlink:type="simple" xlink:href="#root/2cw6UsNxPh8P" text:style-name="Internet_20_link" text:visited-style-name="Visited_20_Internet_20_Link">checkbox lists,</text:a> <text:a xlink:type="simple" xlink:href="#root/aCSuPNYXio5I" text:style-name="Internet_20_link" text:visited-style-name="Visited_20_Internet_20_Link">highlighting</text:a>, <text:a xlink:type="simple" xlink:href="#root/zypWURewFZQF" text:style-name="Internet_20_link" text:visited-style-name="Visited_20_Internet_20_Link">code blocks</text:a> and <text:a xlink:type="simple" xlink:href="#root/YRyvBClSYv9v" text:style-name="Internet_20_link" text:visited-style-name="Visited_20_Internet_20_Link">math examples</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9T19:07:27.309465200</meta:creation-date>
    <dc:date>2026-06-09T19:08:04.131109500</dc:date>
    <meta:editing-duration>PT37S</meta:editing-duration>
    <meta:editing-cycles>1</meta:editing-cycles>
    <meta:document-statistic meta:table-count="0" meta:image-count="0" meta:object-count="0" meta:page-count="1" meta:paragraph-count="24" meta:word-count="150" meta:character-count="947" meta:non-whitespace-character-count="795"/>
    <meta:generator>LibreOffice/26.2.3.2$Windows_X86_64 LibreOffice_project/70e089b17412e4cb7773e41413306b17a2328c34</meta:generator>
  </office:meta>
</office:document-meta>
</file>